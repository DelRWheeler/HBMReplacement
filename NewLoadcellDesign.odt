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MT" svg:font-family="ArialMT"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roman" style:font-pitch="variable"/>
  </office:font-face-decls>
  <office:automatic-styles>
    <style:style style:name="P1" style:family="paragraph" style:parent-style-name="Standard">
      <style:text-properties officeooo:rsid="001d600e" officeooo:paragraph-rsid="001d600e"/>
    </style:style>
    <style:style style:name="P2" style:family="paragraph" style:parent-style-name="Standard">
      <style:text-properties officeooo:paragraph-rsid="001d600e"/>
    </style:style>
    <style:style style:name="P3" style:family="paragraph" style:parent-style-name="Standard">
      <style:text-properties fo:color="#262626" loext:opacity="100%" style:text-outline="false" style:font-name="ArialMT" fo:font-size="10pt" fo:letter-spacing="normal" officeooo:rsid="001d600e" officeooo:paragraph-rsid="001d600e" style:letter-kerning="false" style:font-size-asian="10pt" style:font-size-complex="10pt"/>
    </style:style>
    <style:style style:name="P4" style:family="paragraph" style:parent-style-name="Standard">
      <style:text-properties style:text-outline="false" style:font-name="Verdana" fo:font-size="10pt" fo:letter-spacing="normal" officeooo:rsid="001d600e" officeooo:paragraph-rsid="001d600e" style:letter-kerning="false" style:font-size-asian="10pt" style:font-size-complex="10pt"/>
    </style:style>
    <style:style style:name="P5" style:family="paragraph" style:parent-style-name="Standard">
      <style:text-properties fo:color="#0d0e0e" loext:opacity="100%" style:text-outline="false" style:font-name="HelveticaNeue" fo:font-size="10pt" fo:letter-spacing="normal" officeooo:rsid="001d600e" officeooo:paragraph-rsid="001d600e" style:letter-kerning="false" style:font-size-asian="10pt" style:font-size-complex="10pt"/>
    </style:style>
    <style:style style:name="T1" style:family="text">
      <style:text-properties officeooo:rsid="001d600e"/>
    </style:style>
    <style:style style:name="T2" style:family="text">
      <style:text-properties fo:color="#262626" loext:opacity="100%" style:text-outline="false" style:font-name="ArialMT" fo:font-size="10.5pt" fo:letter-spacing="normal" style:letter-kerning="false" style:font-size-asian="10.5pt" style:font-size-complex="10.5pt"/>
    </style:style>
    <style:style style:name="T3" style:family="text">
      <style:text-properties fo:color="#262626" loext:opacity="100%" style:text-outline="false" style:font-name="ArialMT" fo:font-size="10pt" fo:letter-spacing="normal" officeooo:rsid="001d600e" style:letter-kerning="false" style:font-size-asian="10pt" style:font-size-complex="10pt"/>
    </style:style>
    <style:style style:name="T4" style:family="text">
      <style:text-properties fo:font-size="12pt" style:font-size-asian="12pt"/>
    </style:style>
    <style:style style:name="T5" style:family="text">
      <style:text-properties fo:color="#0d0e0e" loext:opacity="100%" style:font-name="HelveticaNe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CH Service Solutions, LLC.</text:p>
      <text:p text:style-name="P1"/>
      <text:p text:style-name="P1">Proposed load cell design,</text:p>
      <text:p text:style-name="P1"/>
      <text:p text:style-name="P1">1. Design and create a new load cell communication card based on the following:</text:p>
      <text:p text:style-name="P2"><text:span text:style-name="T1"><text:tab/>a. <text:s/></text:span><text:span text:style-name="T2">MIKROE-4985, <text:s/></text:span><text:span text:style-name="T3">Mikroe Click Shield for Pi Pico expands a development board's functionalities <text:tab/><text:tab/>with a Raspberry Pi Pico pinout. The shield for Pi Pico provides two mikroBUS™ sockets <text:tab/><text:tab/><text:tab/>to add functionality from a range of Click boards™. Add everything, from sensors and <text:tab/><text:tab/><text:tab/>WiFi transceivers to motor control and audio amplifiers.</text:span></text:p>
      <text:p text:style-name="P3"><text:tab/>b. MIKROE-5597, Interface Development Tools RS485 Isolator 3 Click</text:p>
      <text:p text:style-name="P3"><text:tab/>c. MIKROE-4940, Power Management IC Development Tools Load Cell 6</text:p>
      <text:p text:style-name="P4"><text:span text:style-name="T4"><text:tab/></text:span>d. <text:span text:style-name="T5">DIGISHUO 2Pcs Raspberry Pi Pico Microcontroller Board with Headers | Flexible Digital <text:tab/><text:tab/><text:tab/>Interfaces | Based on RP2040 Chip | Dual-Core ARM Cortex M0+ Processor 133 MHz | <text:tab/><text:tab/><text:tab/>Support C/C++/Python</text:span></text:p>
      <text:p text:style-name="P5"/>
      <text:p text:style-name="P1"/>
      <text:p text:style-name="P1">The Plan:</text:p>
      <text:p text:style-name="P1"/>
      <text:p text:style-name="P1">Create a new mounting plate for a standard analog load cell that matches length and height of the standard HBM FIT7 load cell. In that mounting plate there will be a machined pocket that will allow the newly designed board to be inserted with cable connections for the load cell to be connected and a RS485 communication cable to be connected and the entire pocket will be potted for wash down protection. If the electronics fails we replace the entire load cell assembly as one unit.</text:p>
      <text:p text:style-name="P1"/>
      <text:p text:style-name="P1">Specifications:</text:p>
      <text:p text:style-name="P1">1. Standard load cell 25kg or similar</text:p>
      <text:p text:style-name="P1">2. 24 Volts DC <text:s/>power supplied by a Belden 8728 cable</text:p>
      <text:p text:style-name="P1">3. Communication cable a second Belden 8728.</text:p>
      <text:p text:style-name="P1">4. Communication protocol. RS485 with baud rate of 38400</text:p>
      <text:p text:style-name="P1">Command structure set up exactly like a HBM FIT7 so that the standard DCH Service Solutions controller software will be a plug and play solution.</text:p>
      <text:p text:style-name="P1"/>
      <text:p text:style-name="P1"/>
      <text:p text:style-name="P1"/>
      <text:p text:style-name="P1"><text:tab/> </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MT" svg:font-family="ArialMT"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8T12:01:12.191385796</meta:creation-date>
    <dc:date>2026-03-28T12:19:57.375116293</dc:date>
    <meta:editing-duration>PT39S</meta:editing-duration>
    <meta:editing-cycles>1</meta:editing-cycles>
    <meta:document-statistic meta:table-count="0" meta:image-count="0" meta:object-count="0" meta:page-count="1" meta:paragraph-count="16" meta:word-count="269" meta:character-count="1640" meta:non-whitespace-character-count="1363"/>
    <meta:generator>LibreOffice/25.8.4.2$Linux_AARCH64 LibreOffice_project/580$Build-2</meta:generator>
  </office:meta>
</office:document-meta>
</file>